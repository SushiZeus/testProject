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等线 Light" svg:font-family="'等线 Light'"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list-style-name="WWNum3"/>
    <style:style style:name="P3" style:family="paragraph" style:parent-style-name="Standard">
      <style:text-properties officeooo:rsid="00125403" officeooo:paragraph-rsid="00125403"/>
    </style:style>
    <style:style style:name="P4" style:family="paragraph" style:parent-style-name="Standard">
      <style:text-properties officeooo:rsid="0014e030" officeooo:paragraph-rsid="00176440"/>
    </style:style>
    <style:style style:name="P5" style:family="paragraph" style:parent-style-name="Standard">
      <style:text-properties officeooo:rsid="00176440" officeooo:paragraph-rsid="00176440"/>
    </style:style>
    <style:style style:name="P6" style:family="paragraph" style:parent-style-name="Standard">
      <style:text-properties officeooo:paragraph-rsid="00190d96"/>
    </style:style>
    <style:style style:name="P7" style:family="paragraph" style:parent-style-name="Standard">
      <style:text-properties officeooo:rsid="001c19f8" officeooo:paragraph-rsid="001c19f8"/>
    </style:style>
    <style:style style:name="P8" style:family="paragraph" style:parent-style-name="Standard">
      <style:text-properties officeooo:rsid="001c19f8" officeooo:paragraph-rsid="001ddf66"/>
    </style:style>
    <style:style style:name="T1" style:family="text">
      <style:text-properties officeooo:rsid="0010bac0"/>
    </style:style>
    <style:style style:name="T2" style:family="text">
      <style:text-properties officeooo:rsid="00139a18"/>
    </style:style>
    <style:style style:name="T3" style:family="text">
      <style:text-properties officeooo:rsid="0016befd"/>
    </style:style>
    <style:style style:name="T4" style:family="text">
      <style:text-properties officeooo:rsid="00176440"/>
    </style:style>
    <style:style style:name="T5" style:family="text">
      <style:text-properties officeooo:rsid="0018d614"/>
    </style:style>
    <style:style style:name="T6" style:family="text">
      <style:text-properties officeooo:rsid="0019047b"/>
    </style:style>
    <style:style style:name="T7" style:family="text">
      <style:text-properties officeooo:rsid="00190d96"/>
    </style:style>
    <style:style style:name="T8" style:family="text">
      <style:text-properties officeooo:rsid="001ad23a"/>
    </style:style>
    <style:style style:name="T9" style:family="text">
      <style:text-properties officeooo:rsid="001dd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web application should have the below flow of events and defined roles: -</text:p>
      <text:list xml:id="list247533917" text:style-name="WWNum2">
        <text:list-item>
          <text:p text:style-name="P1">File Opening</text:p>
        </text:list-item>
      </text:list>
      <text:p text:style-name="Standard">When a new file(shipment) is brought by client through office contact person, it is received by documentation officer, who will fill the following details in the system: - </text:p>
      <text:list text:style-name="WWNum3">
        <text:list-item>
          <text:p text:style-name="P2">If client is new, they will fill client details such as client name, mobile number, email address(optional) and TIN number. If the client is already recorded in the sy<text:span text:style-name="T1">s</text:span>tem the officer can just click their name.</text:p>
        </text:list-item>
        <text:list-item>
          <text:p text:style-name="P2">The details for the shipment to be filled which type of shipment is it <text:span text:style-name="T1">LOCAL(</text:span>IMPORT <text:span text:style-name="T1">or </text:span>EXPORT<text:span text:style-name="T1">),</text:span>TRANSSHIPMENT or TRANSIT <text:span text:style-name="T1">(IMPORT or EXPORT) </text:span>then what is the mode of transport is it AIR, SEA<text:span text:style-name="T8">(container or loose cargo)</text:span>, ROAD or RAIL <text:span text:style-name="T1">then the cargo description to follow</text:span> then the shipping documents are <text:s/>commercial invoice, packing list, Bill of lading, Airway Bill , Road consignment note, Certificate of Conformity(COC), certificate of Origin(COO) and any other shipping document. So, the system has to have a drop-down menu of a list of these documents where the user can select and have a field to upload the documents in pdf format.</text:p>
        </text:list-item>
      </text:list>
      <text:p text:style-name="Standard">Once file opening is completed the system should generate a unique file number for each file created. Once that is done a prompt notification is sent saying WAITING FOR DECLARATION that will prompt Declaration department to assess the file.</text:p>
      <text:list text:continue-list="list247533917" text:style-name="WWNum2">
        <text:list-item>
          <text:p text:style-name="P1">DECLARATION DEPARTMENT</text:p>
        </text:list-item>
      </text:list>
      <text:p text:style-name="Standard"><text:s/>the declaration manager gets notified along with other members for declaration department, the declarant can work on the file when the declaration manager appoints the declarant based on there preference but they have to see the number of files assigned to each declarant and which they are currently working on which will show status WAITING FOR FINAL ASSESSMENT so that they can assign file based on the workload of each declarant. If its IMPORT SHIPMENT the declarant assess the file separately they will attach the assessment of taxes by uploading the documents in the system then will select the DECLARATION DONE which will prompt the contact person to download the documents and share them with client to pay taxes this is done after they acknowledge the notification by selecting shared assessment to client box which the system will show the WAITING FOR TAX payment status. Once the payments are made by client the contact person can fill in the dialogue box that taxes paid then the <text:s/>declarant will check the TAXES PAID box which will prompt the file READY FOR OPERATIONS which will shift the file to Operations department. If its EXPORT or TRANSIT shipment once the declaration is done the declarant will attach the assessment then system will activate the DECLARATION DONE and the file <text:s/>will shift to OPERATIONS DEPARTMENT. <text:s/></text:p>
      <text:list text:continue-numbering="true" text:style-name="WWNum2">
        <text:list-item>
          <text:p text:style-name="P1"><text:soft-page-break/>OPERATIONS DEPARTMENT</text:p>
        </text:list-item>
      </text:list>
      <text:p text:style-name="Standard">Operations department has sub branches that are:- Permits department, Shipping Line department and Delivery department.</text:p>
      <text:p text:style-name="Standard">Once the file is ready for operations, if its IMPORT by AIR the operation manager assigns the file to operation clerk so in the system it will show which operation clerk is selected to work on the file and that clerk will be notified by a prompt that they have been assigned a file, they have to check a box accepting the file which will be an acknowledgment that they are working on it which will change the status to RECEIVED BY CLERK, the clerk will then be able to make request for funds for operations by selecting the file number in a module to make petty cash request, if clerks request for funds they go to operations manager for approvals the clerk portal should have a dialogue box to put description of his request what the funds are for in detail, the request <text:s/>module will have fields like:- selecting file number, filling the amount of funds requested, currency of the funds requested, field to upload any attachment in pdf/jpg format. The system will generate a petty request unique number for each request made on a file. So after filling all necessary details for the request by the clerk, the request will go to Operations manager who will either approve or reject the request by filling a dialogue box with comments which they will have two options of buttons to select to approve or reject the request which will then got to Chief Operations Officer(COO) for final approvals who will also have the same access to approve or reject by commenting in the dialogue box and then selecting approve or reject, if rejected it will go back to line manager first for them to comments if they require explanations from clerk they will have to reject it too for the request to go back to clerk to make comments in the dialogue box too and if done it will follow the proper channel of approvals until it reaches COO who once they approve it will go to Finance manager to make funds arrangement who will then assign cashier to make the payments to the clerk. The permits clerk will <text:span text:style-name="T4">be prompted by the system that there is a shipment to apply permits for, they will </text:span>have to process for permits required for the clearance of the shipment separately and then attach in the system if an invoice is raised to be paid, they should be able to upload any invoice that need payment in the system for that specific file. once they attach the invoice the system will show WAITING FOR PAYMENTS, the contact person will be notified then they will have 2 options to choose CLIENT TO PAY or PROCEED TO REQUEST. If client to pay is selected the permits clerk won’t request for funds they will wait for the contact person to comment on a dialogue box if the client has made payments already then the permits clerk will check the PAYMENTS DONE and also should have access to upload the permit in the system. If the contact person select PROCEED TO REQUEST then the permits clerk will have to make funds request which will follow the same channel of approvals like operation clerk requesting for funds and once the cashier makes payment, they will the dialogue box that payments are done which will be acknowledged by permits clerk by selecting PAYMENTS DONE. With the payments done prompt the <text:soft-page-break/>operation clerk will also be notified so that they may proceed with clearance upon getting release order will upload the release order in the system and then the status of the file will change to WAITING FOR SWISSPORT payments. Upon getting the new status of WAITING FOR SWISSPORT PAYMENTS the system should send a notification to contact person who will contact the client separately to make the payments, if client makes payment the contact person will select the checkbox CLIENT PAID which will send a notification to operation clerk that SWISSPORT CHARGES ARE PAID, with that prompt the DELIVERY CLERK will be prompted to make transportation arrangements to pick the cargo from airport. The HR DEPARTMENT manages all drivers so once the delivery clerk requests for driver by checking the REQUEST FOR DRIVER box the HR will check form their pool of drivers and allocate the driver to collect cargo based on their work load, in the HR module every driver assignment will have to show the job status which will help HR to assign jobs based on the workload for each driver. After selecting the driver, a notification is sent to the driver but also other drivers will be informed of the assignment so if the selected driver is not available or does not acknowledge selection on the system another driver can be assigned the task by HR .once the driver acknowledges by checking the ACCEPTED JOB box the system will show status as D<text:span text:style-name="T9">R</text:span>IVER COLLECTING CARGO. When the driver collects cargo they should check the COLLECTED CARGO box which will prompt the status of the shipment to CARGO COLLECTED FROM AIRPORT. </text:p>
      <text:p text:style-name="P3">If its IMPORT BY SEA, once the taxes are paid the operations manager assigns the the operation clerk <text:span text:style-name="T2">to work on the shipment in the system. The operation clerk will acknowledge receiving the file and working on it after they get notified in their portal that they have been assigned a file,upon accepting the system should show the clerk is working on it. The clerk can request for funds for he specific file in the system and it will follow the same approval process also they can upload verification photos by uploading the photos( a maximum of 4 photos which an be compressed in the system not to occupy more space in the database this for all photo uploaded in the system).</text:span></text:p>
      <text:p text:style-name="P4">Once the clerk accepts file and has gone for verification they should check the VERIFICATION box the system will record the date and time for which the clerk has gone for verification this is for all shipments which clerks are working on, once the<text:span text:style-name="T3">y</text:span> accept file they should <text:span text:style-name="T3">check the VERIFICATION box. The system will show the status SHIPMENT UNDER VERIFICATION, <text:s/>The permits clerk will have to process for permits required for the clearance of the shipment separately and then attach in the system if an invoice is raised to be paid, they should be able to upload any invoice that need payment in the system for that specific file. once they attach the invoice the system will show WAITING FOR PAYMENTS, the contact person will be notified then they will have 2 options to choose CLIENT TO PAY or PROCEED TO REQUEST. If client to pay is selected the permits clerk won’t request for funds they will wait for the contact person to comment on a dialogue box if the client has made payments already then the permits clerk will check the PAYMENTS DONE </text:span><text:soft-page-break/><text:span text:style-name="T3">and also should have access to upload the permit in the system. If the contact person select PROCEED TO REQUEST then the permits clerk will have to make funds request which will follow the same channel of approvals like operation clerk requesting for funds and once the cashier makes payment, they will the dialogue box that payments are done which will be acknowledged by permits clerk by selecting PAYMENTS DONE. With the payments done prompt the operation clerk will also be notified so that they may proceed with clearance upon getting release order will upload the release order in the system .</text:span></text:p>
      <text:p text:style-name="P5">The shipping line clerk will also get prompted <text:span text:style-name="T5">to work on the DELIVERY ORDER once the system recognizes that the file is IMPORT BY SEA, they will also have access to comment on the clearance process comment box of the specific file and also they may request for funds and they will go through the same approval process through </text:span><text:span text:style-name="T6">the line manager who is the OPERATIONS MANAGER like all other clerk who are working on the file. Once they acknowledge working on the file they should check the APPLYING DELIVERY ORDER box this prompt the system to show that the status of the shipment as PROCESSING DELIVERY ORDER. The shipping line clerk will </text:span><text:span text:style-name="T7">apply for the delivery order separately they can upload the invoice of the delivery order in the satem for payments once its paid by either by client through notification from contact person or if payments were made by finance manager then the clerk can check the PAYMENTS DONE which will prompt the system to show DELIVERY ORDER PAYMENTS DONE, once the clerk collects the delivery order they can upload in the system for the operation clerk to download it.</text:span></text:p>
      <text:p text:style-name="P6"><text:span text:style-name="T7">Once the operation clerk has the RELEASE ORDER and DELIVERY ORDER they can check they WAITING FOR PORT CHARGES box this will also be the system status for the file, once they get the invoice for port charges they can upload it in the system for payments which can be initiated by either the client through the same channel of contact person as other payments or they can be paid by finance manager after system approvals </text:span><text:span text:style-name="T8">through fund requests. Once payments are done the responsible person who made the payments can write on the comment section of the file.</text:span></text:p>
      <text:p text:style-name="P7">After port charges are paid, the delivery clerk will be prompted to make arrangements for truck to collect the cargo, once the operation clerk check the PORT CHARGES PAID the system notifies the delivery clerk to make transport arrangements. If the shipment is loose cargo then driver arrangements follow through HR who will allocate the driver in the system but if the shipment is a container then the TRANSPORT MANAGER will allocate truck driver. </text:p>
      <text:p text:style-name="P7">In user registration each user will be registered by the HR or System Admin who will fill the position of each user this will also define their roles. For small truck driver they will under appointment of HR in the system but big trucks they will be under TRANSPORT MANAGER this can be distinguished during account registration for each user by HR who will fill the specific allocation of driver based ion the nature of vehicle they drive.</text:p>
      <text:p text:style-name="P7"><text:soft-page-break/></text:p>
      <text:p text:style-name="P7">The HR DEPARTMENT manages all small truck drivers so once the delivery clerk requests for driver by checking the REQUEST FOR <text:span text:style-name="T9">SMALL TRUCK </text:span>DRIVER box the HR will check form their pool of drivers and allocate the driver to collect cargo based on their work load, in the HR module every driver assignment will have to show the job status which will help HR to assign jobs based on the workload for each driver. After selecting the driver, a notification is sent to the driver but also other drivers will be informed of the assignment so if the selected driver is not available or does not acknowledge selection on the system another driver can be assigned the task by HR .once the driver acknowledges by checking the ACCEPTED JOB box the system will show status as D<text:span text:style-name="T9">R</text:span>IVER COLLECTING CARGO. When the driver collects cargo they should check the COLLECTED CARGO box which will prompt the status of the shipment to CARGO COLLECTED FROM <text:span text:style-name="T9">ICD</text:span> .</text:p>
      <text:p text:style-name="P8">The <text:span text:style-name="T9">TRANSPORT MANAGER</text:span> manages all <text:span text:style-name="T9">big</text:span> truck drivers so once the delivery clerk requests for driver by checking the REQUEST FOR <text:span text:style-name="T9">BIG TRUCK </text:span>DRIVER box the <text:span text:style-name="T9">transport manager </text:span>will check form their pool of drivers and allocate the driver to collect cargo based on their work load, in the <text:span text:style-name="T9">TRANSPORT </text:span>module every driver assignment will have to show the job status which will help <text:span text:style-name="T9">the manager</text:span> to assign jobs based on the workload for each driver. After selecting the driver, a notification is sent to the driver but also other drivers will be informed of the assignment so if the selected driver is not available or does not acknowledge selection on the system another driver can be assigned the task by <text:span text:style-name="T9">the manager </text:span>.once the driver acknowledges by checking the ACCEPTED JOB box the system will show status as D<text:span text:style-name="T9">R</text:span>IVER COLLECTING CARGO. When the driver collects cargo they should check the COLLECTED CARGO box which will prompt the status of the shipment to CARGO COLLECTED FROM <text:span text:style-name="T9">ICD</text:span> . </text:p>
      <text:p text:style-name="P8"><text:span text:style-name="T9">Once the driver delivers the shipment to client they should check the DELIVERED TO CLIENT, but if the shipment is brought to office then the driver will check the SHIPMENT AT WAREHOUSE bo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等线 Light" style:font-family-asian="'等线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等线 Light" style:font-family-asian="'等线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等线 Light" style:font-family-asian="'等线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等线 Light" style:font-family-asian="'等线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muel walter</meta:initial-creator>
    <meta:editing-cycles>9</meta:editing-cycles>
    <meta:creation-date>2026-01-16T20:32:00</meta:creation-date>
    <dc:date>2026-02-12T02:09:21.794898459</dc:date>
    <meta:editing-duration>PT20H46M51S</meta:editing-duration>
    <meta:generator>LibreOffice/24.2.7.2$Linux_X86_64 LibreOffice_project/420$Build-2</meta:generator>
    <meta:document-statistic meta:table-count="0" meta:image-count="0" meta:object-count="0" meta:page-count="5" meta:paragraph-count="20" meta:word-count="2531" meta:character-count="14593" meta:non-whitespace-character-count="12075"/>
    <meta:user-defined meta:name="AppVersion">16.0000</meta:user-defined>
    <meta:template xlink:type="simple" xlink:actuate="onRequest" xlink:title="Normal" xlink:href=""/>
  </office:meta>
</office:document-meta>
</file>